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195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ffbf00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195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a1467e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195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3faf46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195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loext:fill-use-slide-background="false" draw:opacity="65%" draw:textarea-horizontal-align="justify" draw:textarea-vertical-align="middle" draw:auto-grow-height="false" fo:min-height="4.195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 draw:opacity="65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4.445cm" svg:x="3.22cm" svg:y="5.054cm">
          <text:p text:style-name="P1"><text:span text:style-name="T1">XML 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4.445cm" svg:x="9.153cm" svg:y="5.054cm">
          <text:p text:style-name="P1"><text:span text:style-name="T1">SOFC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4.445cm" svg:x="15.268cm" svg:y="5.054cm">
          <text:p text:style-name="P1"><text:span text:style-name="T1">Inver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4.445cm" svg:x="21.165cm" svg:y="5.054cm">
          <text:p text:style-name="P1"><text:span text:style-name="T1">IEEE Mrež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4.445cm" svg:x="9.153cm" svg:y="12.091cm">
          <text:p text:style-name="P1"><text:span text:style-name="T1">DTwin Plugin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148cm" svg:y1="7.276cm" svg:x2="9.053cm" svg:y2="7.276cm">
          <text:p/>
        </draw:line>
        <draw:line draw:style-name="gr7" draw:text-style-name="P3" draw:layer="layout" svg:x1="13.249cm" svg:y1="7.276cm" svg:x2="15.154cm" svg:y2="7.276cm">
          <text:p/>
        </draw:line>
        <draw:line draw:style-name="gr8" draw:text-style-name="P3" draw:layer="layout" svg:x1="19.149cm" svg:y1="7.276cm" svg:x2="21.054cm" svg:y2="7.276cm">
          <text:p/>
        </draw:line>
        <draw:line draw:style-name="gr9" draw:text-style-name="P3" draw:layer="layout" svg:x1="10.989cm" svg:y1="11.58cm" svg:x2="11.005cm" svg:y2="9.8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8T00:08:52.166930400</meta:creation-date>
    <dc:date>2026-06-18T00:09:27.913361800</dc:date>
    <meta:editing-duration>PT36S</meta:editing-duration>
    <meta:editing-cycles>1</meta:editing-cycles>
    <meta:document-statistic meta:object-count="9"/>
    <meta:generator>LibreOffice/26.2.4.2$Windows_X86_64 LibreOffice_project/0229ac93fcf0d7cbc6376066c6f35021cef002dc</meta:generator>
  </office:meta>
</office:document-meta>
</file>