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818cm" fo:min-width="3.8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ffbf00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818cm" fo:min-width="3.8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a1467e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818cm" fo:min-width="3.8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3faf46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818cm" fo:min-width="3.8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818cm" fo:min-width="3.8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 draw:opacity="65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44cm" svg:height="5.068cm" svg:x="1.62cm" svg:y="4.454cm">
          <text:p text:style-name="P1"><text:span text:style-name="T1">XML 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44cm" svg:height="5.068cm" svg:x="8.384cm" svg:y="4.454cm">
          <text:p text:style-name="P1"><text:span text:style-name="T1">SOFC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44cm" svg:height="5.068cm" svg:x="15.356cm" svg:y="4.454cm">
          <text:p text:style-name="P1"><text:span text:style-name="T1">Inver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44cm" svg:height="5.068cm" svg:x="22.08cm" svg:y="4.454cm">
          <text:p text:style-name="P1"><text:span text:style-name="T1">IEEE Mrež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44cm" svg:height="5.068cm" svg:x="8.384cm" svg:y="12.477cm">
          <text:p text:style-name="P1"><text:span text:style-name="T1">DTwin Plugin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098cm" svg:y1="6.987cm" svg:x2="8.27cm" svg:y2="6.987cm">
          <text:p/>
        </draw:line>
        <draw:line draw:style-name="gr7" draw:text-style-name="P3" draw:layer="layout" svg:x1="13.054cm" svg:y1="6.987cm" svg:x2="15.226cm" svg:y2="6.987cm">
          <text:p/>
        </draw:line>
        <draw:line draw:style-name="gr8" draw:text-style-name="P3" draw:layer="layout" svg:x1="19.781cm" svg:y1="6.987cm" svg:x2="21.953cm" svg:y2="6.987cm">
          <text:p/>
        </draw:line>
        <draw:line draw:style-name="gr9" draw:text-style-name="P3" draw:layer="layout" svg:x1="10.478cm" svg:y1="11.894cm" svg:x2="10.496cm" svg:y2="9.8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8T00:08:52.166930400</meta:creation-date>
    <dc:date>2026-06-21T18:36:13.913798300</dc:date>
    <meta:editing-duration>PT56S</meta:editing-duration>
    <meta:editing-cycles>2</meta:editing-cycles>
    <meta:generator>LibreOffice/26.2.4.2$Windows_X86_64 LibreOffice_project/0229ac93fcf0d7cbc6376066c6f35021cef002dc</meta:generator>
    <meta:document-statistic meta:object-count="9"/>
  </office:meta>
</office:document-meta>
</file>