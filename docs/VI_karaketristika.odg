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9B0BD45F8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2cm" draw:fill="none" draw:textarea-vertical-align="middle" loext:decorative="false"/>
    </style:style>
    <style:style style:name="gr2" style:family="graphic" style:parent-style-name="objectwithoutfill">
      <style:graphic-properties draw:marker-end="Arrowheads_20_3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97cm" svg:y1="10.79cm" svg:x2="19.097cm" svg:y2="10.79cm">
          <text:p/>
        </draw:line>
        <draw:line draw:style-name="gr2" draw:text-style-name="P1" draw:layer="layout" svg:x1="7.35cm" svg:y1="11.477cm" svg:x2="7.35cm" svg:y2="2.27cm">
          <text:p/>
        </draw:line>
        <draw:frame draw:style-name="gr3" draw:text-style-name="P2" draw:layer="layout" svg:width="2.54cm" svg:height="0.962cm" svg:x="17.51cm" svg:y="11.16cm">
          <draw:text-box>
            <text:p>I [A]</text:p>
          </draw:text-box>
        </draw:frame>
        <draw:frame draw:style-name="gr3" draw:text-style-name="P2" draw:layer="layout" svg:width="2.54cm" svg:height="0.962cm" svg:x="5.362cm" svg:y="2.26cm">
          <draw:text-box>
            <text:p>V [V]</text:p>
          </draw:text-box>
        </draw:frame>
        <draw:frame draw:style-name="gr4" draw:text-style-name="P2" draw:layer="layout" svg:width="6.033cm" svg:height="1.27cm" svg:x="2.127cm" svg:y="3.775cm">
          <draw:text-box>
            <text:p>V_nerst=1.299 V</text:p>
          </draw:text-box>
        </draw:frame>
        <draw:frame draw:style-name="gr4" draw:text-style-name="P2" draw:layer="layout" svg:width="6.033cm" svg:height="1.27cm" svg:x="14.017cm" svg:y="11.195cm">
          <draw:text-box>
            <text:p>I_nom=25A</text:p>
          </draw:text-box>
        </draw:frame>
        <draw:frame draw:style-name="gr5" draw:text-style-name="P1" draw:layer="layout" svg:width="13.335cm" svg:height="6.285cm" svg:x="3.54cm" svg:y="13.13cm">
          <draw:image xlink:href="Pictures/10000001000003680000019B0BD45F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7T23:42:19.111212300</meta:creation-date>
    <dc:date>2026-06-18T00:08:42.902628700</dc:date>
    <meta:editing-duration>PT13M1S</meta:editing-duration>
    <meta:editing-cycles>2</meta:editing-cycles>
    <meta:generator>LibreOffice/26.2.4.2$Windows_X86_64 LibreOffice_project/0229ac93fcf0d7cbc6376066c6f35021cef002dc</meta:generator>
    <meta:document-statistic meta:object-count="7"/>
  </office:meta>
</office:document-meta>
</file>