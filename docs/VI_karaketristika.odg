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2cm" draw:fill="none" draw:textarea-vertical-align="middle" loext:decorative="false"/>
    </style:style>
    <style:style style:name="gr2" style:family="graphic" style:parent-style-name="objectwithoutfill">
      <style:graphic-properties draw:marker-end="Arrowheads_20_3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7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71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37cm" fo:min-width="0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36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278cm" svg:y1="14.749cm" svg:x2="23.49cm" svg:y2="14.749cm">
          <text:p/>
        </draw:line>
        <draw:line draw:style-name="gr2" draw:text-style-name="P1" draw:layer="layout" svg:x1="8.494cm" svg:y1="15.626cm" svg:x2="8.494cm" svg:y2="3.873cm">
          <text:p/>
        </draw:line>
        <draw:frame draw:style-name="gr3" draw:text-style-name="P2" draw:layer="layout" svg:width="3.243cm" svg:height="1.228cm" svg:x="23.123cm" svg:y="15.221cm">
          <draw:text-box>
            <text:p>I [A]</text:p>
          </draw:text-box>
        </draw:frame>
        <draw:frame draw:style-name="gr3" draw:text-style-name="P2" draw:layer="layout" svg:width="3.242cm" svg:height="1.228cm" svg:x="5.957cm" svg:y="3.86cm">
          <draw:text-box>
            <text:p>V [V]</text:p>
          </draw:text-box>
        </draw:frame>
        <draw:frame draw:style-name="gr4" draw:text-style-name="P2" draw:layer="layout" svg:width="7.701cm" svg:height="1.621cm" svg:x="1.827cm" svg:y="5.794cm">
          <draw:text-box>
            <text:p>V_nerst=1.299 V</text:p>
          </draw:text-box>
        </draw:frame>
        <draw:frame draw:style-name="gr4" draw:text-style-name="P2" draw:layer="layout" svg:width="4.863cm" svg:height="1.621cm" svg:x="17.516cm" svg:y="15.266cm">
          <draw:text-box>
            <text:p>I_nom=25A</text:p>
          </draw:text-box>
        </draw:frame>
        <draw:line draw:style-name="gr5" draw:text-style-name="P1" draw:layer="layout" svg:x1="9.305cm" svg:y1="14.538cm" svg:x2="9.305cm" svg:y2="14.944cm">
          <text:p/>
        </draw:line>
        <draw:line draw:style-name="gr5" draw:text-style-name="P1" draw:layer="layout" svg:x1="10.198cm" svg:y1="14.538cm" svg:x2="10.198cm" svg:y2="14.944cm">
          <text:p/>
        </draw:line>
        <draw:line draw:style-name="gr5" draw:text-style-name="P1" draw:layer="layout" svg:x1="10.964cm" svg:y1="14.538cm" svg:x2="10.964cm" svg:y2="14.944cm">
          <text:p/>
        </draw:line>
        <draw:line draw:style-name="gr5" draw:text-style-name="P1" draw:layer="layout" svg:x1="11.73cm" svg:y1="14.538cm" svg:x2="11.73cm" svg:y2="14.944cm">
          <text:p/>
        </draw:line>
        <draw:line draw:style-name="gr5" draw:text-style-name="P1" draw:layer="layout" svg:x1="12.369cm" svg:y1="14.538cm" svg:x2="12.369cm" svg:y2="14.944cm">
          <text:p/>
        </draw:line>
        <draw:line draw:style-name="gr5" draw:text-style-name="P1" draw:layer="layout" svg:x1="13.007cm" svg:y1="14.538cm" svg:x2="13.007cm" svg:y2="14.944cm">
          <text:p/>
        </draw:line>
        <draw:line draw:style-name="gr5" draw:text-style-name="P1" draw:layer="layout" svg:x1="13.645cm" svg:y1="14.538cm" svg:x2="13.645cm" svg:y2="14.944cm">
          <text:p/>
        </draw:line>
        <draw:line draw:style-name="gr5" draw:text-style-name="P1" draw:layer="layout" svg:x1="14.156cm" svg:y1="14.538cm" svg:x2="14.156cm" svg:y2="14.944cm">
          <text:p/>
        </draw:line>
        <draw:line draw:style-name="gr5" draw:text-style-name="P1" draw:layer="layout" svg:x1="14.666cm" svg:y1="14.538cm" svg:x2="14.666cm" svg:y2="14.944cm">
          <text:p/>
        </draw:line>
        <draw:line draw:style-name="gr5" draw:text-style-name="P1" draw:layer="layout" svg:x1="15.177cm" svg:y1="14.538cm" svg:x2="15.177cm" svg:y2="14.944cm">
          <text:p/>
        </draw:line>
        <draw:line draw:style-name="gr5" draw:text-style-name="P1" draw:layer="layout" svg:x1="15.815cm" svg:y1="14.538cm" svg:x2="15.815cm" svg:y2="14.944cm">
          <text:p/>
        </draw:line>
        <draw:line draw:style-name="gr5" draw:text-style-name="P1" draw:layer="layout" svg:x1="16.326cm" svg:y1="14.538cm" svg:x2="16.326cm" svg:y2="14.944cm">
          <text:p/>
        </draw:line>
        <draw:line draw:style-name="gr5" draw:text-style-name="P1" draw:layer="layout" svg:x1="16.836cm" svg:y1="14.538cm" svg:x2="16.836cm" svg:y2="14.944cm">
          <text:p/>
        </draw:line>
        <draw:line draw:style-name="gr5" draw:text-style-name="P1" draw:layer="layout" svg:x1="17.347cm" svg:y1="14.538cm" svg:x2="17.347cm" svg:y2="14.944cm">
          <text:p/>
        </draw:line>
        <draw:line draw:style-name="gr5" draw:text-style-name="P1" draw:layer="layout" svg:x1="17.985cm" svg:y1="14.538cm" svg:x2="17.985cm" svg:y2="14.944cm">
          <text:p/>
        </draw:line>
        <draw:line draw:style-name="gr5" draw:text-style-name="P1" draw:layer="layout" svg:x1="18.624cm" svg:y1="14.538cm" svg:x2="18.624cm" svg:y2="14.944cm">
          <text:p/>
        </draw:line>
        <draw:line draw:style-name="gr5" draw:text-style-name="P1" draw:layer="layout" svg:x1="19.262cm" svg:y1="14.538cm" svg:x2="19.262cm" svg:y2="14.944cm">
          <text:p/>
        </draw:line>
        <draw:line draw:style-name="gr5" draw:text-style-name="P1" draw:layer="layout" svg:x1="8.281cm" svg:y1="13.572cm" svg:x2="8.689cm" svg:y2="13.567cm">
          <text:p/>
        </draw:line>
        <draw:line draw:style-name="gr5" draw:text-style-name="P1" draw:layer="layout" svg:x1="8.282cm" svg:y1="13.061cm" svg:x2="8.69cm" svg:y2="13.056cm">
          <text:p/>
        </draw:line>
        <draw:line draw:style-name="gr5" draw:text-style-name="P1" draw:layer="layout" svg:x1="8.282cm" svg:y1="12.551cm" svg:x2="8.69cm" svg:y2="12.546cm">
          <text:p/>
        </draw:line>
        <draw:line draw:style-name="gr5" draw:text-style-name="P1" draw:layer="layout" svg:x1="8.282cm" svg:y1="12.04cm" svg:x2="8.69cm" svg:y2="12.035cm">
          <text:p/>
        </draw:line>
        <draw:line draw:style-name="gr5" draw:text-style-name="P1" draw:layer="layout" svg:x1="8.282cm" svg:y1="11.529cm" svg:x2="8.69cm" svg:y2="11.524cm">
          <text:p/>
        </draw:line>
        <draw:line draw:style-name="gr5" draw:text-style-name="P1" draw:layer="layout" svg:x1="8.282cm" svg:y1="11.019cm" svg:x2="8.69cm" svg:y2="11.014cm">
          <text:p/>
        </draw:line>
        <draw:line draw:style-name="gr5" draw:text-style-name="P1" draw:layer="layout" svg:x1="8.282cm" svg:y1="10.508cm" svg:x2="8.69cm" svg:y2="10.503cm">
          <text:p/>
        </draw:line>
        <draw:line draw:style-name="gr5" draw:text-style-name="P1" draw:layer="layout" svg:x1="8.282cm" svg:y1="9.997cm" svg:x2="8.69cm" svg:y2="9.992cm">
          <text:p/>
        </draw:line>
        <draw:line draw:style-name="gr5" draw:text-style-name="P1" draw:layer="layout" svg:x1="8.282cm" svg:y1="9.487cm" svg:x2="8.69cm" svg:y2="9.482cm">
          <text:p/>
        </draw:line>
        <draw:line draw:style-name="gr5" draw:text-style-name="P1" draw:layer="layout" svg:x1="8.282cm" svg:y1="8.976cm" svg:x2="8.69cm" svg:y2="8.971cm">
          <text:p/>
        </draw:line>
        <draw:line draw:style-name="gr5" draw:text-style-name="P1" draw:layer="layout" svg:x1="8.282cm" svg:y1="8.466cm" svg:x2="8.69cm" svg:y2="8.461cm">
          <text:p/>
        </draw:line>
        <draw:line draw:style-name="gr5" draw:text-style-name="P1" draw:layer="layout" svg:x1="8.282cm" svg:y1="7.955cm" svg:x2="8.69cm" svg:y2="7.95cm">
          <text:p/>
        </draw:line>
        <draw:line draw:style-name="gr5" draw:text-style-name="P1" draw:layer="layout" svg:x1="8.282cm" svg:y1="7.444cm" svg:x2="8.69cm" svg:y2="7.439cm">
          <text:p/>
        </draw:line>
        <draw:line draw:style-name="gr5" draw:text-style-name="P1" draw:layer="layout" svg:x1="8.282cm" svg:y1="6.934cm" svg:x2="8.69cm" svg:y2="6.929cm">
          <text:p/>
        </draw:line>
        <draw:line draw:style-name="gr5" draw:text-style-name="P1" draw:layer="layout" svg:x1="8.282cm" svg:y1="6.423cm" svg:x2="8.69cm" svg:y2="6.418cm">
          <text:p/>
        </draw:line>
        <draw:custom-shape draw:style-name="gr6" draw:text-style-name="P3" draw:layer="layout" svg:width="0.406cm" svg:height="0.405cm" svg:x="8.305cm" svg:y="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06cm" svg:height="0.405cm" svg:x="9.454cm" svg:y="9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6cm" svg:height="0.404cm" svg:x="10.731cm" svg:y="10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06cm" svg:height="0.405cm" svg:x="12.646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06cm" svg:height="0.405cm" svg:x="14.56cm" svg:y="1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6cm" svg:height="0.404cm" svg:x="16.603cm" svg:y="13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06cm" svg:height="0.405cm" svg:x="19.028cm" svg:y="1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367cm" svg:y1="6.305cm" svg:x2="9.582cm" svg:y2="9.141cm">
          <text:p/>
        </draw:line>
        <draw:line draw:style-name="gr5" draw:text-style-name="P1" draw:layer="layout" svg:x1="9.771cm" svg:y1="9.368cm" svg:x2="10.926cm" svg:y2="10.762cm">
          <text:p/>
        </draw:line>
        <draw:line draw:style-name="gr5" draw:text-style-name="P1" draw:layer="layout" svg:x1="11.054cm" svg:y1="10.762cm" svg:x2="12.675cm" svg:y2="11.573cm">
          <text:p/>
        </draw:line>
        <draw:line draw:style-name="gr5" draw:text-style-name="P1" draw:layer="layout" svg:x1="12.836cm" svg:y1="11.667cm" svg:x2="14.852cm" svg:y2="12.661cm">
          <text:p/>
        </draw:line>
        <draw:line draw:style-name="gr5" draw:text-style-name="P1" draw:layer="layout" svg:x1="14.752cm" svg:y1="12.69cm" svg:x2="16.877cm" svg:y2="13.194cm">
          <text:p/>
        </draw:line>
        <draw:line draw:style-name="gr5" draw:text-style-name="P1" draw:layer="layout" svg:x1="16.922cm" svg:y1="13.328cm" svg:x2="19.032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7T23:42:19.111212300</meta:creation-date>
    <dc:date>2026-06-21T18:35:36.621360900</dc:date>
    <meta:editing-duration>PT25M49S</meta:editing-duration>
    <meta:editing-cycles>5</meta:editing-cycles>
    <meta:generator>LibreOffice/26.2.4.2$Windows_X86_64 LibreOffice_project/0229ac93fcf0d7cbc6376066c6f35021cef002dc</meta:generator>
    <meta:document-statistic meta:object-count="51"/>
  </office:meta>
</office:document-meta>
</file>