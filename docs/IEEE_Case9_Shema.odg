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38" draw:textarea-horizontal-align="justify" draw:textarea-vertical-align="middle" draw:auto-grow-height="false" fo:min-height="0.369cm" fo:min-width="0.119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3faf46" draw:textarea-horizontal-align="justify" draw:textarea-vertical-align="middle" draw:auto-grow-height="false" fo:min-height="0.369cm" fo:min-width="0.11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69cm" fo:min-width="0.119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fill="solid" draw:fill-color="#ff4000" draw:textarea-horizontal-align="justify" draw:textarea-vertical-align="middle" draw:auto-grow-height="false" fo:min-height="1.063cm" fo:min-width="3.87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4000" draw:textarea-horizontal-align="justify" draw:textarea-vertical-align="middle" draw:auto-grow-height="false" fo:min-height="1.064cm" fo:min-width="3.87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0.625cm" fo:min-width="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76cm" loext:decorative="false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0.625cm" fo:min-width="3.001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38"/>
      <style:paragraph-properties fo:text-align="center" style:writing-mode="lr-tb"/>
    </style:style>
    <style:style style:name="P3" style:family="paragraph">
      <loext:graphic-properties draw:fill="solid" draw:fill-color="#3faf46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4000"/>
      <style:paragraph-properties fo:text-align="center" style:writing-mode="lr-tb"/>
    </style:style>
    <style:style style:name="P7" style:family="paragraph">
      <loext:graphic-properties draw:fill="solid" draw:fill-color="#b4c7dc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75cm" svg:height="0.875cm" svg:x="15.539cm" svg:y="15.32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75cm" svg:height="0.875cm" svg:x="21.187cm" svg:y="5.81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75cm" svg:height="0.875cm" svg:x="6.884cm" svg:y="5.8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75cm" svg:height="0.875cm" svg:x="10.385cm" svg:y="11.498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75cm" svg:height="0.875cm" svg:x="9.073cm" svg:y="5.8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75cm" svg:height="0.875cm" svg:x="13.449cm" svg:y="5.81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75cm" svg:height="0.875cm" svg:x="18.861cm" svg:y="5.81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75cm" svg:height="0.875cm" svg:x="17.824cm" svg:y="11.498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6.009cm" svg:y1="7.108cm" svg:x2="21.762cm" svg:y2="7.122cm">
          <text:p/>
        </draw:line>
        <draw:line draw:style-name="gr4" draw:text-style-name="P5" draw:layer="layout" svg:x1="12.849cm" svg:y1="11.773cm" svg:x2="13.885cm" svg:y2="14.123cm">
          <text:p/>
        </draw:line>
        <draw:custom-shape draw:style-name="gr5" draw:text-style-name="P6" draw:layer="layout" svg:width="4.376cm" svg:height="1.313cm" svg:x="12.16cm" svg:y="16.749cm"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376cm" svg:height="1.314cm" svg:x="21.786cm" svg:y="6.685cm"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5cm" svg:height="0.875cm" svg:x="9.179cm" svg:y="12.811cm">
          <text:p text:style-name="P1"><text:span text:style-name="T1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5.892cm" svg:height="1.326cm" svg:x="11.471cm" svg:y="3.022cm">
          <draw:text-box>
            <text:p>IEEE Case 9</text:p>
          </draw:text-box>
        </draw:frame>
        <draw:line draw:style-name="gr4" draw:text-style-name="P5" draw:layer="layout" svg:x1="13.251cm" svg:y1="15.805cm" svg:x2="15.438cm" svg:y2="15.805cm">
          <text:p/>
        </draw:line>
        <draw:line draw:style-name="gr4" draw:text-style-name="P5" draw:layer="layout" svg:x1="14.324cm" svg:y1="14.123cm" svg:x2="14.331cm" svg:y2="16.693cm">
          <text:p/>
        </draw:line>
        <draw:line draw:style-name="gr4" draw:text-style-name="P5" draw:layer="layout" svg:x1="13.253cm" svg:y1="14.151cm" svg:x2="15.44cm" svg:y2="14.151cm">
          <text:p/>
        </draw:line>
        <draw:custom-shape draw:style-name="gr3" draw:text-style-name="P4" draw:layer="layout" svg:width="0.875cm" svg:height="0.875cm" svg:x="15.498cm" svg:y="13.68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5.952cm" svg:y1="11.775cm" svg:x2="14.916cm" svg:y2="14.125cm">
          <text:p/>
        </draw:line>
        <draw:line draw:style-name="gr4" draw:text-style-name="P5" draw:layer="layout" svg:x1="10.385cm" svg:y1="7.56cm" svg:x2="12.297cm" svg:y2="11.798cm">
          <text:p/>
        </draw:line>
        <draw:line draw:style-name="gr4" draw:text-style-name="P5" draw:layer="layout" svg:x1="11.6cm" svg:y1="11.808cm" svg:x2="13.787cm" svg:y2="11.808cm">
          <text:p/>
        </draw:line>
        <draw:line draw:style-name="gr4" draw:text-style-name="P5" draw:layer="layout" svg:x1="15.185cm" svg:y1="11.808cm" svg:x2="17.372cm" svg:y2="11.808cm">
          <text:p/>
        </draw:line>
        <draw:line draw:style-name="gr4" draw:text-style-name="P5" draw:layer="layout" svg:x1="10.328cm" svg:y1="5.856cm" svg:x2="10.335cm" svg:y2="8.426cm">
          <text:p/>
        </draw:line>
        <draw:line draw:style-name="gr4" draw:text-style-name="P5" draw:layer="layout" svg:x1="18.774cm" svg:y1="7.562cm" svg:x2="16.862cm" svg:y2="11.8cm">
          <text:p/>
        </draw:line>
        <draw:line draw:style-name="gr4" draw:text-style-name="P5" draw:layer="layout" svg:x1="18.737cm" svg:y1="5.857cm" svg:x2="18.744cm" svg:y2="8.427cm">
          <text:p/>
        </draw:line>
        <draw:line draw:style-name="gr4" draw:text-style-name="P5" draw:layer="layout" svg:x1="14.464cm" svg:y1="5.857cm" svg:x2="14.471cm" svg:y2="8.427cm">
          <text:p/>
        </draw:line>
        <draw:line draw:style-name="gr4" draw:text-style-name="P5" draw:layer="layout" svg:x1="21.079cm" svg:y1="5.857cm" svg:x2="21.086cm" svg:y2="8.427cm">
          <text:p/>
        </draw:line>
        <draw:line draw:style-name="gr4" draw:text-style-name="P5" draw:layer="layout" svg:x1="7.849cm" svg:y1="5.857cm" svg:x2="7.856cm" svg:y2="8.427cm">
          <text:p/>
        </draw:line>
        <draw:custom-shape draw:style-name="gr5" draw:text-style-name="P6" draw:layer="layout" svg:width="4.376cm" svg:height="1.313cm" svg:x="1.61cm" svg:y="6.523cm"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501cm" svg:height="0.875cm" svg:x="16.345cm" svg:y="12.813cm">
          <text:p text:style-name="P1"><text:span text:style-name="T1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501cm" svg:height="0.875cm" svg:x="12.762cm" svg:y="8.54cm">
          <text:p text:style-name="P1"><text:span text:style-name="T1">Loa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8T00:10:05.956638000</meta:creation-date>
    <dc:date>2026-06-21T18:35:01.736032300</dc:date>
    <meta:editing-duration>PT13M27S</meta:editing-duration>
    <meta:editing-cycles>8</meta:editing-cycles>
    <meta:generator>LibreOffice/26.2.4.2$Windows_X86_64 LibreOffice_project/0229ac93fcf0d7cbc6376066c6f35021cef002dc</meta:generator>
    <meta:document-statistic meta:object-count="31"/>
  </office:meta>
</office:document-meta>
</file>