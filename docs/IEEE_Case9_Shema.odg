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D0000025F5A96973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76cm" svg:height="12.848cm" svg:x="6.509cm" svg:y="4.371cm">
          <draw:image xlink:href="Pictures/10000001000002CD0000025F5A9697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8T00:10:05.956638000</meta:creation-date>
    <dc:date>2026-06-18T00:11:04.920356000</dc:date>
    <meta:editing-duration>PT59S</meta:editing-duration>
    <meta:editing-cycles>1</meta:editing-cycles>
    <meta:document-statistic meta:object-count="1"/>
    <meta:generator>LibreOffice/26.2.4.2$Windows_X86_64 LibreOffice_project/0229ac93fcf0d7cbc6376066c6f35021cef002dc</meta:generator>
  </office:meta>
</office:document-meta>
</file>